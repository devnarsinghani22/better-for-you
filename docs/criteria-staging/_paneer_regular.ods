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ular_20_Pane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ular Pane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/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in/Amul-Fresh-Paneer-200g/dp/B078KT9RB1" xlink:type="simple">Amul Malai Fresh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amzn.in/d/052wECmG" xlink:type="simple">Gowardhan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humpyfarms.com/products/a2-desi-cow-paneer" xlink:type="simple">Humpy A2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8" office:value-type="float" office:value="1" calcext:value-type="float">
            <text:p>1</text:p>
          </table:table-cell>
          <table:table-cell table:style-name="ce5" office:value-type="string" calcext:value-type="string">
            <text:p>Only 2 ingredients: 1) Milk/ Milk Solids. <text:s text:c="4"/>2) Acidic Agent (lime/citric acid/vinegar)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riteria cannot be a paragraph. It has to be bullet point. </text:p>
          </table:table-cell>
          <table:table-cell table:style-name="ce1" table:number-columns-repeated="16"/>
          <table:table-cell table:number-columns-repeated="1003"/>
        </table:table-row>
        <table:table-row table:style-name="ro1" table:number-rows-repeated="5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980">
          <table:table-cell table:style-name="ce1" table:number-columns-repeated="21"/>
          <table:table-cell table:number-columns-repeated="1003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ular_20_Paneer" style:display-name="PageStyle_Regular Pane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