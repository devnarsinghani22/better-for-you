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187.51pt"/>
    </style:style>
    <style:style style:name="co4" style:family="table-column">
      <style:table-column-properties fo:break-before="auto" style:column-width="100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igh_20_Protein_20_and_20_Low_20_Fat_20_Pane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2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gh Protein and Low Fat Pane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>
            <text:p>S No</text:p>
          </table:table-cell>
          <table:table-cell table:style-name="ce2"/>
          <table:table-cell table:style-name="ce2" office:value-type="string" calcext:value-type="string">
            <text:p>Revant's Approval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amzn.in/d/0cq6Kvld" xlink:type="simple">ID Fresh High Protein Paneer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s://www.milkymist.com/paneer" xlink:type="simple">Milky Mist High Protein Paneer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s://shop.amul.com/en/product/amul-high-protein-paneer-400-g-or-pack-of-24" xlink:type="simple">Amul High Protein Paneer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4" calcext:value-type="float">
            <text:p>4</text:p>
          </table:table-cell>
          <table:table-cell table:style-name="ce4" office:value-type="string" calcext:value-type="string">
            <text:p><text:a xlink:href="https://www.zepto.com/pn/desi-farms-high-protein-paneer/pvid/a2c96cc2-7ea0-43de-98e3-7963c730a66b?srsltid=AfmBOoow5u4aAwmnJDgd65Mme3OjRvRXIz6YvrScjN7nxenKtQDBkx7C" xlink:type="simple">Desi Farms High Protein Paneer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number-columns-repeated="3"/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 table:number-rows-repeated="2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>
            <text:p>S No</text:p>
          </table:table-cell>
          <table:table-cell table:style-name="ce2" office:value-type="string" calcext:value-type="string">
            <text:p>Criteria</text:p>
          </table:table-cell>
          <table:table-cell table:style-name="ce2" office:value-type="string" calcext:value-type="string">
            <text:p>Revant's Approval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7" office:value-type="float" office:value="6" calcext:value-type="float">
            <text:p>6</text:p>
          </table:table-cell>
          <table:table-cell table:style-name="ce5" office:value-type="string" calcext:value-type="string">
            <text:p>Only milk (or milk solids) and an acidic agent like lime, citric acid, or vinegar.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No paragraphs. 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3" table:formula="of:=ROW()-7" office:value-type="float" office:value="7" calcext:value-type="float">
            <text:p>7</text:p>
          </table:table-cell>
          <table:table-cell table:style-name="ce6" office:value-type="string" calcext:value-type="string">
            <text:p>At least 25 g of protein per 100 g.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Milky mist has 50g, and ID has 56g. I think 25g is too less. 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3" table:formula="of:=ROW()-7" office:value-type="float" office:value="8" calcext:value-type="float">
            <text:p>8</text:p>
          </table:table-cell>
          <table:table-cell table:style-name="ce5" office:value-type="string" calcext:value-type="string">
            <text:p>Less than 10 g of fat per 100 g.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 table:number-rows-repeated="980">
          <table:table-cell table:style-name="ce1" table:number-columns-repeated="21"/>
          <table:table-cell table:number-columns-repeated="1003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igh_20_Protein_20_and_20_Low_20_Fat_20_Paneer" style:display-name="PageStyle_High Protein and Low Fat Pane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LibreOfficeDev/6.0.5.2$Linux_X86_64 LibreOffice_project/</meta:generator>
  </office:meta>
</office:document-meta>
</file>