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00.69pt"/>
    </style:style>
    <style:style style:name="co5" style:family="table-column">
      <style:table-column-properties fo:break-before="auto" style:column-width="127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oodl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od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Products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shop.mylittlemoppet.com/shop/wheat-noodles/" xlink:type="simple">Little Moppet Foods Wheat Noodles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://amazon.in/Naturally-Non-Fried-Preservative-Tastemaker-Included/dp/B07YHF9H1Q/" xlink:type="simple">Naturally Yours Quinoa Noodles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urbanplatter.com/products/urban-platter-shirataki-konjac-noodles-270g?country=IN&amp;currency=INR&amp;gad_campaignid=22854036403&amp;gad_source=1&amp;gbraid=0AAAAADf15nLvd1zZjTOkfNaP5gBn3xRKX&amp;gclid=CjwKCAjwwpDQBhAuEiwAa-4Wo6B_wUjh3rCPHGrBWo46g5n5kAU4Fc2SdmCUYkqXvlO50Yz17YSlIBoCO1gQAvD_BwE&amp;utm_campaign=sag_organic&amp;utm_content=sag_organic&amp;utm_medium=product_sync&amp;utm_source=google&amp;variant=44872549892247" xlink:type="simple">Urban Platter Shirataki Konjac Noodles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Need more options. Only 2 are not enough</text:p>
          </table:table-cell>
          <table:table-cell table:style-name="ce1"/>
          <table:table-cell table:style-name="ce6" office:value-type="string" calcext:value-type="string">
            <text:p>Done</text:p>
          </table:table-cell>
          <table:table-cell table:style-name="ce1" table:number-columns-repeated="14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amzn.in/d/07CvVIMG" xlink:type="simple">Jiwa Instant Oats Noodles 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number-columns-repeated="4"/>
          <table:table-cell table:style-name="ce1" table:number-columns-repeated="16"/>
          <table:table-cell table:number-columns-repeated="1003"/>
        </table:table-row>
        <table:table-row table:style-name="ro1" table:number-rows-repeated="3">
          <table:table-cell table:style-name="ce1"/>
          <table:table-cell table:number-columns-repeated="4"/>
          <table:table-cell table:style-name="ce1" table:number-columns-repeated="16"/>
          <table:table-cell table:number-columns-repeated="1003"/>
        </table:table-row>
        <table:table-row table:style-name="ro1" table:number-rows-repeated="3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8" office:value-type="float" office:value="8" calcext:value-type="float">
            <text:p>8</text:p>
          </table:table-cell>
          <table:table-cell table:style-name="ce5" office:value-type="string" calcext:value-type="string">
            <text:p>No Maida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8" office:value-type="float" office:value="9" calcext:value-type="float">
            <text:p>9</text:p>
          </table:table-cell>
          <table:table-cell table:style-name="ce5" office:value-type="string" calcext:value-type="string">
            <text:p>Sodium less than 300 mg per 100 g.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980">
          <table:table-cell table:style-name="ce1" table:number-columns-repeated="21"/>
          <table:table-cell table:number-columns-repeated="1003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odles" style:display-name="PageStyle_Nood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Dev/6.0.5.2$Linux_X86_64 LibreOffice_project/</meta:generator>
  </office:meta>
</office:document-meta>
</file>