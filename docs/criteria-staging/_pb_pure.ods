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87.51pt"/>
    </style:style>
    <style:style style:name="co4" style:family="table-column">
      <style:table-column-properties fo:break-before="auto" style:column-width="100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00_25__20_Peanut_20_Butt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2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% Peanut But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/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myfitness.in/products/myfitness-all-natural-peanut-butter-crunchy?variant=39986581602458" xlink:type="simple">Myfitness Natural Unsweetened Peanut Butter Crunchy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pintola.in/products/all-natural-peanut-butter" xlink:type="simple">Pintola All Natural Peanut Butter Crunchy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3" calcext:value-type="float">
            <text:p>3</text:p>
          </table:table-cell>
          <table:table-cell table:style-name="ce5" office:value-type="string" calcext:value-type="string">
            <text:p><text:a xlink:href="https://alpino.store/products/alpino-natural-peanut-butter-crunch?variant=37823674613930&amp;country=IN&amp;currency=INR&amp;utm_medium=product_sync&amp;utm_source=google&amp;utm_content=sag_organic&amp;utm_campaign=sag_organic&amp;gad_source=1&amp;gad_campaignid=23329192551&amp;gbraid=0AAAAAC01PeNh0V9zyNyMvjgzmjAVDXa9H&amp;gclid=CjwKCAjwwpDQBhAuEiwAa-4Woxkd7jZpX3h3xzjhwzhiVPN55Sr67_inCVrwzaMnOnQljcloK3Nq8xoCKpIQAvD_BwE" xlink:type="simple">Alpino Peanut Butter Crunch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https://www.thebutternutcompany.com/products/the-butternut-co-natural-peanut-butter-creamy-800-2000000094453?currency=INR&amp;variant=45442036334875&amp;utm_source=google&amp;utm_medium=cpc&amp;utm_campaign=Google%20Shopping&amp;stkn=32b70302e1aa&amp;srsltid=AfmBOopgcZ-z_GJuzAq9vGo_hJa5pdfSiJ5Dy_On8CiQGEakMjF7YI89TUw" xlink:type="simple">The Butternut Co. Natural Peanut Butter (Creamy)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Criteria</text:p>
          </table:table-cell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7" office:value-type="float" office:value="4" calcext:value-type="float">
            <text:p>4</text:p>
          </table:table-cell>
          <table:table-cell table:style-name="ce6" office:value-type="string" calcext:value-type="string">
            <text:p>100% peanuts or peanuts + whe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7" office:value-type="float" office:value="5" calcext:value-type="float">
            <text:p>5</text:p>
          </table:table-cell>
          <table:table-cell table:style-name="ce7" office:value-type="string" calcext:value-type="string">
            <text:p>No sug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7" office:value-type="float" office:value="6" calcext:value-type="float">
            <text:p>6</text:p>
          </table:table-cell>
          <table:table-cell table:style-name="ce7" office:value-type="string" calcext:value-type="string">
            <text:p>No hydrogenated oils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7" office:value-type="float" office:value="7" calcext:value-type="float">
            <text:p>7</text:p>
          </table:table-cell>
          <table:table-cell table:style-name="ce7" office:value-type="string" calcext:value-type="string">
            <text:p>No salt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 table:number-rows-repeated="978">
          <table:table-cell table:style-name="ce1" table:number-columns-repeated="21"/>
          <table:table-cell table:number-columns-repeated="1003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0_25__20_Peanut_20_Butter" style:display-name="PageStyle_100% Peanut But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LibreOfficeDev/6.0.5.2$Linux_X86_64 LibreOffice_project/</meta:generator>
  </office:meta>
</office:document-meta>
</file>