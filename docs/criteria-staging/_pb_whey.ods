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anut_20_Butter_20__2b__20_Whe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anut Butter + Whe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/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nutroasters.in/products/high-protein-peanut-butter-unsweetened-vegan-keto#&amp;gid=1&amp;pid=1" xlink:type="simple">Nut Roasters Zero Sugar High Protein Peanut Butter with Whey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pintola.in/products/high-protein-all-natural-peanut-butter-unsweetened?_pos=1&amp;_psq=unsweete&amp;_ss=e&amp;_v=1.0" xlink:type="simple">Pintola High Protein Peanut Butter Creamy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1" calcext:value-type="float">
            <text:p>1</text:p>
          </table:table-cell>
          <table:table-cell table:style-name="ce6" office:value-type="string" calcext:value-type="string">
            <text:p>No sug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no paragraph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2" calcext:value-type="float">
            <text:p>2</text:p>
          </table:table-cell>
          <table:table-cell table:style-name="ce6" office:value-type="string" calcext:value-type="string">
            <text:p>No salt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7" office:value-type="float" office:value="3" calcext:value-type="float">
            <text:p>3</text:p>
          </table:table-cell>
          <table:table-cell table:style-name="ce6" office:value-type="string" calcext:value-type="string">
            <text:p>No hydrogenated oils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Combine with previous category</text:p>
          </table:table-cell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No sugar</text:p>
          </table:table-cell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No hydrogenated oils</text:p>
          </table:table-cell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/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979">
          <table:table-cell table:style-name="ce1" table:number-columns-repeated="21"/>
          <table:table-cell table:number-columns-repeated="1003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anut_20_Butter_20__2b__20_Whey" style:display-name="PageStyle_Peanut Butter + Whe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